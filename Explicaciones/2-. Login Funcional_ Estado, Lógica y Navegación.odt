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top="0in" fo:margin-bottom="0.1146in" loext:contextual-spacing="false" fo:line-height="114%" fo:padding="0in" fo:border="none"/>
    </style:style>
    <style:style style:name="P2" style:family="paragraph" style:parent-style-name="Standard" style:master-page-name="Standard">
      <style:paragraph-properties fo:margin-top="0in" fo:margin-bottom="0.1146in" loext:contextual-spacing="false" fo:line-height="114%" style:page-number="1" fo:padding="0in" fo:border="none"/>
    </style:style>
    <style:style style:name="P3" style:family="paragraph" style:parent-style-name="Standard" style:list-style-name="WWNum1">
      <style:paragraph-properties fo:margin-left="0.3957in" fo:margin-right="0in" fo:margin-top="0in" fo:margin-bottom="0in" loext:contextual-spacing="false" fo:line-height="114%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3957in" fo:margin-right="0in" fo:margin-top="0in" fo:margin-bottom="0in" loext:contextual-spacing="false" fo:line-height="114%" fo:text-indent="-0.25in" style:auto-text-indent="false" fo:padding="0in" fo:border="none"/>
    </style:style>
    <style:style style:name="P5" style:family="paragraph" style:parent-style-name="Standard" style:list-style-name="WWNum2">
      <style:paragraph-properties fo:margin-left="0.3957in" fo:margin-right="0in" fo:margin-top="0in" fo:margin-bottom="0in" loext:contextual-spacing="false" fo:line-height="114%" fo:text-indent="-0.25in" style:auto-text-indent="false" fo:padding="0in" fo:border="none"/>
    </style:style>
    <style:style style:name="P6" style:family="paragraph" style:parent-style-name="Standard" style:list-style-name="WWNum3">
      <style:paragraph-properties fo:margin-left="0.3957in" fo:margin-right="0in" fo:margin-top="0in" fo:margin-bottom="0in" loext:contextual-spacing="false" fo:line-height="114%" fo:text-indent="-0.25in" style:auto-text-indent="false" fo:padding="0in" fo:border="none"/>
    </style:style>
    <style:style style:name="P7" style:family="paragraph" style:parent-style-name="Standard" style:list-style-name="WWNum5">
      <style:paragraph-properties fo:margin-left="0.3957in" fo:margin-right="0in" fo:margin-top="0in" fo:margin-bottom="0in" loext:contextual-spacing="false" fo:line-height="114%" fo:text-indent="-0.25in" style:auto-text-indent="false" fo:padding="0in" fo:border="none"/>
    </style:style>
    <style:style style:name="P8" style:family="paragraph" style:parent-style-name="Standard" style:list-style-name="WWNum5">
      <style:paragraph-properties fo:margin-left="0.3957in" fo:margin-right="0in" fo:margin-top="0in" fo:margin-bottom="0in" loext:contextual-spacing="false" fo:line-height="114%" fo:text-indent="-0.25in" style:auto-text-indent="false" fo:padding="0in" fo:border="none"/>
    </style:style>
    <style:style style:name="P9" style:family="paragraph" style:parent-style-name="Standard" style:list-style-name="WWNum1">
      <style:paragraph-properties fo:margin-left="0.3957in" fo:margin-right="0in" fo:margin-top="0in" fo:margin-bottom="0.0835in" loext:contextual-spacing="false" fo:line-height="114%" fo:text-indent="-0.25in" style:auto-text-indent="false" fo:padding="0in" fo:border="none"/>
    </style:style>
    <style:style style:name="P10" style:family="paragraph" style:parent-style-name="Standard" style:list-style-name="WWNum2">
      <style:paragraph-properties fo:margin-left="0.3957in" fo:margin-right="0in" fo:margin-top="0in" fo:margin-bottom="0.0835in" loext:contextual-spacing="false" fo:line-height="114%" fo:text-indent="-0.25in" style:auto-text-indent="false" fo:padding="0in" fo:border="none"/>
    </style:style>
    <style:style style:name="P11" style:family="paragraph" style:parent-style-name="Standard" style:list-style-name="WWNum3">
      <style:paragraph-properties fo:margin-left="0.3957in" fo:margin-right="0in" fo:margin-top="0in" fo:margin-bottom="0.0835in" loext:contextual-spacing="false" fo:line-height="114%" fo:text-indent="-0.25in" style:auto-text-indent="false" fo:padding="0in" fo:border="none"/>
    </style:style>
    <style:style style:name="P12" style:family="paragraph" style:parent-style-name="Standard" style:list-style-name="WWNum4">
      <style:paragraph-properties fo:margin-left="0.3957in" fo:margin-right="0in" fo:margin-top="0in" fo:margin-bottom="0.0835in" loext:contextual-spacing="false" fo:line-height="114%" fo:text-indent="-0.25in" style:auto-text-indent="false" fo:padding="0in" fo:border="none"/>
    </style:style>
    <style:style style:name="P13" style:family="paragraph" style:parent-style-name="Standard" style:list-style-name="WWNum5">
      <style:paragraph-properties fo:margin-left="0.3957in" fo:margin-right="0in" fo:margin-top="0in" fo:margin-bottom="0.0835in" loext:contextual-spacing="false" fo:line-height="114%" fo:text-indent="-0.25in" style:auto-text-indent="false" fo:padding="0in" fo:border="none"/>
    </style:style>
    <style:style style:name="P14" style:family="paragraph" style:parent-style-name="Standard">
      <style:paragraph-properties fo:margin-top="0.1665in" fo:margin-bottom="0.1146in" loext:contextual-spacing="false" fo:line-height="114%" fo:padding="0in" fo:border="none"/>
    </style:style>
    <style:style style:name="P15" style:family="paragraph" style:parent-style-name="Heading_20_3">
      <style:paragraph-properties fo:margin-top="0.0835in" fo:margin-bottom="0.0835in" loext:contextual-spacing="false" fo:line-height="114%" fo:padding="0in" fo:border="none"/>
    </style:style>
    <style:style style:name="P16" style:family="paragraph" style:parent-style-name="Heading_20_3">
      <style:paragraph-properties fo:margin-top="0.1665in" fo:margin-bottom="0.0835in" loext:contextual-spacing="false" fo:line-height="114%" fo:padding="0in" fo:border="none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color="#1f1f1f" style:font-name="Google Sans" style:font-name-asian="Google Sans1" style:font-name-complex="Google Sans1"/>
    </style:style>
    <style:style style:name="T2" style:family="text">
      <style:text-properties fo:color="#1f1f1f" style:font-name="Google Sans" fo:font-weight="bold" style:font-name-asian="Google Sans1" style:font-weight-asian="bold" style:font-name-complex="Google Sans1" style:font-weight-complex="bold"/>
    </style:style>
    <style:style style:name="T3" style:family="text">
      <style:text-properties fo:color="#1f1f1f" style:font-name="Google Sans" fo:font-style="italic" style:font-name-asian="Google Sans1" style:font-style-asian="italic" style:font-name-complex="Google Sans1" style:font-style-complex="italic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083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ara que el login pasara de ser un simple formulario a una función real que conecta con Odoo y navega por la app, hemos tenido que conectar tres piezas clave: el </text:span><text:span text:style-name="T2">Estado</text:span><text:span text:style-name="T1">, la </text:span><text:span text:style-name="T2">Lógica</text:span><text:span text:style-name="T1"> y la </text:span><text:span text:style-name="T2">Navegación</text:span><text:span text:style-name="T1">.</text:span></text:p>
      <text:p text:style-name="P1"><text:span text:style-name="T1">Aquí te explico paso a paso lo que hemos construido:</text:span></text:p>
      <text:p text:style-name="P15"><draw:rect text:anchor-type="as-char" style:rel-width="100%" draw:z-index="0" draw:style-name="gr1" draw:text-style-name="P17" svg:width="0.0012in" svg:height="0.0213in"><text:p/></draw:rect><text:span text:style-name="T1">1. El "Cerebro" (AuthViewModel)</text:span></text:p>
      <text:p text:style-name="P1"><text:span text:style-name="T1">Hemos creado una clase llamada AuthViewModel. Su única misión es gestionar la autenticación.</text:span></text:p>
      <text:list xml:id="list2094912715" text:style-name="WWNum1">
        <text:list-item>
          <text:p text:style-name="P3"><text:span text:style-name="T2">Estado:</text:span><text:span text:style-name="T1"> Tiene una variable uid (el ID del usuario) que empieza siendo null.</text:span></text:p>
        </text:list-item>
        <text:list-item>
          <text:p text:style-name="P3"><text:span text:style-name="T2">Acción:</text:span><text:span text:style-name="T1"> Cuando pulsas el botón, ejecuta la función fetchUser. Esta función "llama" a Odoo usando el OdooClient.</text:span></text:p>
        </text:list-item>
        <text:list-item>
          <text:p text:style-name="P9"><text:span text:style-name="T2">Resultado:</text:span><text:span text:style-name="T1"> Si la contraseña es correcta, Odoo nos devuelve un número (el UID). El ViewModel guarda ese número. Si falla, guarda un 0.</text:span></text:p>
        </text:list-item>
      </text:list>
      <text:p text:style-name="P16"><text:span text:style-name="T1">2. El "Vigilante" (LaunchedEffect en LoginScreen)</text:span></text:p>
      <text:p text:style-name="P1"><text:span text:style-name="T1">En la pantalla de Login, no navegamos inmediatamente al pulsar el botón. Pusimos un "vigilante" (LaunchedEffect) que se queda observando el uid del cerebro (ViewModel).</text:span></text:p>
      <text:list xml:id="list1449399750" text:style-name="WWNum2">
        <text:list-item>
          <text:p text:style-name="P5"><text:span text:style-name="T2">¿Qué hace?</text:span><text:span text:style-name="T1"> En cuanto ve que el uid cambia y es mayor que 0, da la orden: </text:span><text:span text:style-name="T3">"¡Vía libre! Navega a la pantalla principal"</text:span><text:span text:style-name="T1">.</text:span></text:p>
        </text:list-item>
        <text:list-item>
          <text:p text:style-name="P10"><text:span text:style-name="T2">Seguridad:</text:span><text:span text:style-name="T1"> Al navegar, usamos popUpTo("login") { inclusive = true }. Esto sirve para que, si el usuario intenta volver atrás, no regrese al formulario de login, sino que salga de la app (porque ya está logueado).</text:span></text:p>
        </text:list-item>
      </text:list>
      <text:p text:style-name="P16"><text:span text:style-name="T1">3. El "Pasaporte" (UID por Navegación)</text:span></text:p>
      <text:p text:style-name="P1"><text:span text:style-name="T1">Para que la pantalla principal sepa quién eres y qué datos mostrar, enviamos el uid a través de la ruta de navegación, como si fuera parte de una dirección web:</text:span></text:p>
      <text:list xml:id="list3158682334" text:style-name="WWNum3">
        <text:list-item>
          <text:p text:style-name="P6"><text:span text:style-name="T1">Ruta: "main/{uid}" (ejemplo: "main/2").</text:span></text:p>
        </text:list-item>
        <text:list-item>
          <text:p text:style-name="P11"><text:span text:style-name="T1">Esto permite que la siguiente pantalla reciba ese número y lo use para pedir a Odoo tus albaranes específicos.</text:span></text:p>
        </text:list-item>
      </text:list>
      <text:p text:style-name="P16"><text:span text:style-name="T1">4. La "Fábrica" (MainViewModelFactory)</text:span></text:p>
      <text:p text:style-name="P1"><text:span text:style-name="T1">Aquí es donde la cosa se puso técnica. La pantalla principal necesita el uid y el repositorio para funcionar. Como Android no sabe pasarle datos directamente a un ViewModel al crearlo, fabricamos una </text:span><text:span text:style-name="T2">Factory</text:span><text:span text:style-name="T1">.</text:span></text:p>
      <text:list xml:id="list739920341" text:style-name="WWNum4">
        <text:list-item>
          <text:p text:style-name="P12"><text:span text:style-name="T1">Es como un molde que le dice a la app: </text:span><text:span text:style-name="T3">"Para crear la pantalla principal, usa este repositorio y este número de usuario que traigo del login"</text:span><text:span text:style-name="T1">.</text:span></text:p>
        </text:list-item>
      </text:list>
      <text:p text:style-name="P16"><text:span text:style-name="T1">5. La Limpieza del "Motor" (Gradle)</text:span></text:p>
      <text:p text:style-name="P1"><text:span text:style-name="T1">Finalmente, corregimos un error crítico de configuración. Tenías instalada una librería de navegación "falsa" (jvmstubs) que no tenía motor interno. La cambiamos por la librería oficial de Android (navigation-compose) para que el NavHost pudiera realmente cambiar de una pantalla a otra.</text:span></text:p>
      <text:p text:style-name="P15"><draw:rect text:anchor-type="as-char" style:rel-width="100%" draw:z-index="1" draw:style-name="gr1" draw:text-style-name="P17" svg:width="0.0012in" svg:height="0.0213in"><text:p/></draw:rect><text:span text:style-name="T1">Resumen del flujo:</text:span></text:p>
      <text:list xml:id="list278683006" text:style-name="WWNum5">
        <text:list-item>
          <text:p text:style-name="P7"><text:span text:style-name="T2">Usuario</text:span><text:span text:style-name="T1"> escribe datos y da a "Login".</text:span></text:p>
        </text:list-item>
        <text:list-item>
          <text:p text:style-name="P7"><text:span text:style-name="T2">AuthViewModel</text:span><text:span text:style-name="T1"> pregunta a Odoo: "¿Es correcto?".</text:span></text:p>
        </text:list-item>
        <text:list-item>
          <text:p text:style-name="P7"><text:span text:style-name="T2">Odoo</text:span><text:span text:style-name="T1"> responde: "Sí, es el usuario 8".</text:span></text:p>
        </text:list-item>
        <text:list-item>
          <text:p text:style-name="P7"><text:span text:style-name="T2">LoginScreen</text:span><text:span text:style-name="T1"> detecta el "8" y lanza la navegación.</text:span></text:p>
        </text:list-item>
        <text:list-item>
          <text:p text:style-name="P13"><text:soft-page-break/><text:span text:style-name="T2">Navigation</text:span><text:span text:style-name="T1"> recibe el "8", fabrica el MainViewModel con ese ID y abre la </text:span><text:span text:style-name="T2">MainScreen</text:span><text:span text:style-name="T1">.</text:span></text:p>
        </text:list-item>
      </text:list>
      <text:p text:style-name="P14"><text:span text:style-name="T1">¿Hay alguna de estas partes que te gustaría que detallemos más a fondo para tu documentación o exame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3957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3957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3957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3957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3957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455" meta:character-count="2685" meta:non-whitespace-character-count="2270"/>
    <meta:generator>LibreOfficeDev/6.0.5.2$Linux_X86_64 LibreOffice_project/</meta:generator>
  </office:meta>
</office:document-meta>
</file>